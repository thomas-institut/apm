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487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8.003cm"/>
    </style:style>
    <style:style style:name="co6" style:family="table-column">
      <style:table-column-properties fo:break-before="auto" style:column-width="1.335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4.157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4.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60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style:font-name-asian="Tahoma"/>
    </style:style>
    <style:style style:name="ce8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font-name="Arial"/>
    </style:style>
    <style:style style:name="ce10" style:family="table-cell" style:parent-style-name="Default">
      <style:table-cell-properties fo:wrap-option="wrap"/>
      <style:text-properties style:font-name="Arial" style:font-name-asian="Tahoma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2" table:number-columns-repeated="16370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th</text:p>
          </table:table-cell>
          <table:table-cell table:style-name="ce3" office:value-type="string" calcext:value-type="string">
            <text:p>Authenticated</text:p>
          </table:table-cell>
          <table:table-cell table:style-name="ce1" office:value-type="string" calcext:value-type="string">
            <text:p>Handler</text:p>
          </table:table-cell>
          <table:table-cell table:style-name="ce3" office:value-type="string" calcext:value-type="string">
            <text:p>Action</text:p>
          </table:table-cell>
          <table:table-cell table:style-name="ce1" office:value-type="string" calcext:value-type="string">
            <text:p>Output Type</text:p>
          </table:table-cell>
          <table:table-cell table:style-name="ce1" office:value-type="string" calcext:value-type="string">
            <text:p>Output Schema</text:p>
          </table:table-cell>
          <table:table-cell table:style-name="ce1" office:value-type="string" calcext:value-type="string">
            <text:p>TS Interface File</text:p>
          </table:table-cell>
          <table:table-cell table:style-name="ce1" office:value-type="string" calcext:value-type="string">
            <text:p>TS Int name</text:p>
          </table:table-cell>
          <table:table-cell table:style-name="ce8" office:value-type="string" calcext:value-type="string">
            <text:p>Interface Inconsistencies</text:p>
          </table:table-cell>
          <table:table-cell table:style-name="ce1" office:value-type="string" calcext:value-type="string">
            <text:p>ApiClient Method</text:p>
          </table:table-cell>
          <table:table-cell table:style-name="ce1" office:value-type="string" calcext:value-type="string">
            <text:p>JS Client Users</text:p>
          </table:table-cell>
          <table:table-cell table:style-name="ce1" office:value-type="string" calcext:value-type="string">
            <text:p>JS Client Bypassers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path:.*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React::ReactMai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{document}/{page}/newcolum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addNewColum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{document}/{page}/numcolum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NumColumn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admin/log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Log::frontEndLog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ationTable/{tableId}/convertToEdi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convertTo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{tableId}/get[/{timestamp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ge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{tableId}/versionInfo/{timestamp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versionInfo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active/edi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activeEdition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active/forWork/{work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activeForWork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ationTable/aut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auto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ationTable/sav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sav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doc/{docId}/info[/{pageInfoToInclude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DocumentInfo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doc/{id}/addpag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addPag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doc/cre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createDocumen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doc/getId/{doc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DocId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docs/al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allDocumentsData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dition/multi/get/{editionId}[/{timestamp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MultiChunkEdition::get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dition/multi/sav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MultiChunkEdition::save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dition/source/get/{t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ditionSources::getSourceByTid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dition/sources/al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ditionSources::getAllSourc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entityType}/entiti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EntitiesForTyp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id}/predicateDefini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PredicateDefin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id}/predicateDefinitionsForTyp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PredicateDefinitionsForTyp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tid}/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EntityData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nameSearch/{inputString}/{typeList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nameSearch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statementQualificationObject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ValidQualificationObject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statementQualificationObjects/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ValidQualificationObject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ntity/statements/edi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statement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chaptermark/{work}/{level}/{number}/{type}/{dir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ChapterMarkIc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charactergap/{length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CharacterGapImag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chunkmark/{dareid}/{chunkno}/{lwid}/{segment}/{type}/{dir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ChunkMarkIc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illegible/{size}/{length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IllegibleIc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linegap/{count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LineGapImag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mark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MarkIc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nowb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NoWordBreakIc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paragraphmark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ParagraphMarkIc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login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Authenticator::apiLo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-hoc</text:p>
          </table:table-cell>
          <table:table-cell table:style-name="ce7" office:value-type="string" calcext:value-type="string">
            <text:p>{status, message, token, ttl}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age/{pageId}/inf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PageInfo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age/{pageId}/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updatePageSetting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age/bulk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updatePageSettingsBulk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age/typ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PageTyp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ages/inf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PageInfoBulk</text:p>
          </table:table-cell>
          <table:table-cell table:number-columns-repeated="9"/>
          <table:table-cell table:style-name="ce2" table:number-columns-repeated="16370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erson/{tid}/data/essentia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getPersonEssential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tExportObject</text:p>
          </table:table-cell>
          <table:table-cell office:value-type="string" calcext:value-type="string">
            <text:p>PersonEssentialData class</text:p>
          </table:table-cell>
          <table:table-cell office:value-type="string" calcext:value-type="string">
            <text:p>DataSchema/ApiPeople.ts</text:p>
          </table:table-cell>
          <table:table-cell table:style-name="ce7" office:value-type="string" calcext:value-type="string">
            <text:p>PersonEssentialData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erson/{tid}/work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getWorksByPers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erson/all/dataForPeoplePag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getAllPeopleDataForPeoplePag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erson/cre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personCreat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act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getAutomaticCollationPreset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resets/delete/{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deletePrese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getPreset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pos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savePrese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sigla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getSiglaPreset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sigla/sav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saveSiglaPrese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edi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EditionTitl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editor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Editor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earch/keyword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search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transcriber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Transcriber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transcrip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TranscriptionTitles</text:p>
          </table:table-cell>
          <table:table-cell table:number-columns-repeated="9"/>
          <table:table-cell table:style-name="ce2" table:number-columns-repeated="16370"/>
        </table:table-row>
        <table:table-row table:style-name="ro3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ystem/languag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ystem::getSystemLanguag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w config arra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Schema/LanguageInfo.ts</text:p>
          </table:table-cell>
          <table:table-cell office:value-type="string" calcext:value-type="string">
            <text:p>Language Info</text:p>
            <text:p>LanguageInfoObject</text:p>
          </table:table-cell>
          <table:table-cell table:style-name="ce10" office:value-type="string" calcext:value-type="string">
            <text:p>TS interface has totalWitnesses, validWitnesses, normalizerData which may not be in the config array</text:p>
          </table:table-cell>
          <table:table-cell table:number-columns-repeated="3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transcriptions/{document}/{page}/{column}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lements::getElementsByDocPageCol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transcriptions/{document}/{page}/{column}/get/version/{version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lements::getElementsByDocPageCol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transcriptions/{document}/{page}/{column}/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lements::updateElementsByDocPageCol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transcriptions/byUser/{userTid}/docPage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getTranscribedPag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typeset/raw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TypesetPdf::generatePDF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userId}/collationTabl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CollationTabl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userId}/multiChunkEdi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MultiChunkEdition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/{userTid}/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UpdateProfil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/create/{personT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Create</text:p>
          </table:table-cell>
          <table:table-cell table:number-columns-repeated="9"/>
          <table:table-cell table:style-name="ce2" table:number-columns-repeated="16370"/>
        </table:table-row>
        <table:table-row table:style-name="ro4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hoami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ystem::whoAmI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Data.getExportObject() + ad-hoc fields </text:p>
          </table:table-cell>
          <table:table-cell table:style-name="ce7" office:value-type="string" calcext:value-type="string">
            <text:p>(name, email, isRoot, manageUsers, tidString)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itness/{witnessId}/to/edi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convertWitnessTo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itness/check/updat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checkWitnessUpdat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itness/get/{witnessId}[/{outputType}[/{cache}]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getWitnes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chunk/{chunkNumber}/ctabl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getCollationTablesForChunk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chunk/{chunkNumber}/witness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getWitnessesForChunk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chunksWithTranscrip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ChunksWithTranscrip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WorkData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old-inf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WorkInfoOld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s/al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allWorksData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s/author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AuthorLis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p-setting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SiteSettings::getSiteSetting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hunk-edition/{tableId}[/{version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CollationTable::editCollationTabl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hunk-edition/new/{workId}/{chunkNumber}/{lang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CollationTable::newChunk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llation-table/{tableId}[/{version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CollationTable::editCollationTabl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llation-table/auto/{work}/{chunk}/{lang}[/{ignore_punct}[/{witnesses:.*}]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CollationTable::automaticCollationPageGe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collation-table/auto/{work}/{chunk}/{lang}/custom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CollationTable::automaticCollationPageCustom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llation-table/auto/{work}/{chunk}/preset/{preset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CollationTable::automaticCollationPagePreset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v/metadata-editor/{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MetadataEditor::metadataEditorPag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v/php-inf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closure (inline phpinfo handler)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oc/{doc}/page/{n}/view[/c/{col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PageViewer::pageViewerPageByDoc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oc/{doc}/realPage/{n}/view[/c/{col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PageViewer::pageViewerPageByDoc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oc/{id}[/{params:.*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Documents::documentPag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oc/{id}/definepag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Documents::defineDocPages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login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SiteReact::ReactMai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ulti-chunk-edition/{edition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MultiChunkEdition::getMultiChunk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ulti-chunk-edition/new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MultiChunkEdition::getMultiChunkEdition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person/{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People::personPage</text:p>
          </table:table-cell>
          <table:table-cell table:number-columns-repeated="9"/>
          <table:table-cell table:style-name="ce2" table:number-columns-repeated="16370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work/{work}/chunk/{chunk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SiteChunkPage::singleChunkPage</text:p>
          </table:table-cell>
          <table:table-cell table:number-columns-repeated="9"/>
          <table:table-cell table:style-name="ce2" table:number-columns-repeated="16370"/>
        </table:table-row>
        <table:table-row table:style-name="ro1" table:number-rows-repeated="1048478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  <table:database-ranges>
        <table:database-range table:name="__Anonymous_Sheet_DB__0" table:target-range-address="Inventory.A1:Inventory.E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YuGothic" style:font-size-asian="10pt" style:language-asian="ja" style:country-asian="JP" style:font-name-complex="Tahoma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ja" style:country-asian="JP" style:font-name-complex="Tahoma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Gothic" style:font-family-asian="YuGothic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afael Nájera</meta:initial-creator>
    <meta:creation-date>2026-04-30T12:10:16.650124000</meta:creation-date>
    <meta:generator>LibreOffice/25.8.4.2$MacOSX_X86_64 LibreOffice_project/290daaa01b999472f0c7a3890eb6a550fd74c6df</meta:generator>
    <dc:date>2026-04-30T12:56:10.739092000</dc:date>
    <dc:creator>Rafael Nájera</dc:creator>
    <meta:editing-duration>PT12M16S</meta:editing-duration>
    <meta:editing-cycles>4</meta:editing-cycles>
    <meta:document-statistic meta:table-count="1" meta:cell-count="518" meta:object-count="0"/>
    <meta:user-defined meta:name=""/>
  </office:meta>
</office:document-meta>
</file>